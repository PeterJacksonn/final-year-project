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text-underline-style="none" fo:font-weight="normal" style:font-weight-asian="normal" style:font-weight-complex="normal"/>
    </style:style>
    <style:style style:name="P2" style:family="paragraph" style:parent-style-name="Horizontal_20_Line">
      <style:paragraph-properties fo:margin-top="0in" fo:margin-bottom="0.0972in" style:contextual-spacing="false" fo:line-height="115%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[Title slide — 2 seconds]</text:span></text:p>
      <text:p text:style-name="P2"/>
      <text:p text:style-name="Text_20_body"><text:span text:style-name="Strong_20_Emphasis">[Overview slide]</text:span></text:p>
      <text:list text:style-name="L1">
        <text:list-item>
          <text:p text:style-name="P3">Three parts: deliverable reflection and testing, personal performance, PDP </text:p>
        </text:list-item>
        <text:list-item>
          <text:p text:style-name="P4">Everything covered in more depth in the report — I'll reference it throughout rather than repeat it </text:p>
        </text:list-item>
      </text:list>
      <text:p text:style-name="P2"/>
      <text:p text:style-name="Text_20_body"><text:span text:style-name="Strong_20_Emphasis">[Requirements slide]</text:span></text:p>
      <text:list text:style-name="L2">
        <text:list-item>
          <text:p text:style-name="P5">All 7 specs met — as documented in the report's proposed solution section </text:p>
        </text:list-item>
        <text:list-item>
          <text:p text:style-name="P5">Worth noting spec 7 is marked "simulated" — this is an honest acknowledgement, not a failure. Real sensor integration would be the next step for production </text:p>
        </text:list-item>
        <text:list-item>
          <text:p text:style-name="P6">The system solves both problems identified in the intro — periodic sampling gap addressed by the real-time pipeline, semantic interoperability gap addressed by NGSI-LD and Smart Data Models </text:p>
        </text:list-item>
      </text:list>
      <text:p text:style-name="P2"/>
      <text:p text:style-name="Text_20_body"><text:span text:style-name="Strong_20_Emphasis">[Testing — Methodology slide]</text:span></text:p>
      <text:list text:style-name="L3">
        <text:list-item>
          <text:p text:style-name="P7">Manual testing adopted — justified by three factors: </text:p>
          <text:list>
            <text:list-item>
              <text:p text:style-name="P7">Single developer, exploratory scope, time constraints </text:p>
            </text:list-item>
            <text:list-item>
              <text:p text:style-name="P7">Automated test setup overhead would not have been justified at this scale </text:p>
            </text:list-item>
            <text:list-item>
              <text:p text:style-name="P7">As noted in section 4.7 of the report, a production deployment would warrant automated integration testing and CI/CD pipelines </text:p>
            </text:list-item>
          </text:list>
        </text:list-item>
        <text:list-item>
          <text:p text:style-name="P7">Why not automated? — not because it's less valuable, but because the effort-to-benefit ratio didn't make sense for a research prototype </text:p>
        </text:list-item>
        <text:list-item>
          <text:p text:style-name="P7">Why no human participants? — target users (environmental officers, EA analysts) not accessible in academic context. EA open data used as proxy for real-world validation instead </text:p>
        </text:list-item>
        <text:list-item>
          <text:p text:style-name="P8">Testing methodology documented formally in Appendix D </text:p>
        </text:list-item>
      </text:list>
      <text:p text:style-name="Text_20_body"><text:span text:style-name="Emphasis">Footnote: Beck et al. (2001). Manifesto for Agile Software Development</text:span></text:p>
      <text:p text:style-name="P2"/>
      <text:p text:style-name="Text_20_body"><text:span text:style-name="Strong_20_Emphasis">[Testing — Pipeline Verification slide]</text:span></text:p>
      <text:list text:style-name="L4">
        <text:list-item>
          <text:p text:style-name="P9">Show curl POST to Orion-LD </text:p>
        </text:list-item>
        <text:list-item>
          <text:p text:style-name="P9">Show SQL SELECT confirming row in etwaterqualityobserved </text:p>
        </text:list-item>
        <text:list-item>
          <text:p text:style-name="P9">This is TC08 from Appendix D — verifies the full NGSI-LD pipeline end to end </text:p>
        </text:list-item>
        <text:list-item>
          <text:p text:style-name="P10">Entity created → QuantumLeap subscription triggered → persisted to TimescaleDB → queryable via asyncpg </text:p>
        </text:list-item>
      </text:list>
      <text:p text:style-name="P2"/>
      <text:p text:style-name="Text_20_body"><text:span text:style-name="Strong_20_Emphasis">[Testing — Lighthouse slide]</text:span></text:p>
      <text:list text:style-name="L5">
        <text:list-item>
          <text:p text:style-name="P11">Google Lighthouse chosen because it maps axe-core rules directly to WCAG 2.1 criteria — industry standard, reproducible, auditable </text:p>
        </text:list-item>
        <text:list-item>
          <text:p text:style-name="P11">Show screenshot </text:p>
        </text:list-item>
        <text:list-item>
          <text:p text:style-name="P11">Dashboard 91, Map 96, Entity Manager 92 — all above 90 threshold </text:p>
        </text:list-item>
        <text:list-item>
          <text:p text:style-name="P12"><text:soft-page-break/>Any failures during development were treated as defects requiring resolution before submission, as stated in section 5.2 of the report </text:p>
        </text:list-item>
      </text:list>
      <text:p text:style-name="Text_20_body"><text:span text:style-name="Emphasis">Footnote: Google (n.d.). Lighthouse accessibility scoring</text:span></text:p>
      <text:p text:style-name="P2"/>
      <text:p text:style-name="Text_20_body"><text:span text:style-name="Strong_20_Emphasis">[NEW — Security slide]</text:span></text:p>
      <text:list text:style-name="L6">
        <text:list-item>
          <text:p text:style-name="P13">Worth acknowledging security as it relates to production readiness </text:p>
        </text:list-item>
        <text:list-item>
          <text:p text:style-name="P13">The API has no authentication — appropriate for a local prototype but a clear gap for production. In a deployed system, JWT-based authentication would be required at the FastAPI layer </text:p>
        </text:list-item>
        <text:list-item>
          <text:p text:style-name="P13">EA data is published under the Open Government Licence — no data privacy concerns, no GDPR obligations as discussed in section 5.3 of the report </text:p>
        </text:list-item>
        <text:list-item>
          <text:p text:style-name="P13">The stack runs over HTTP locally — a production deployment would require HTTPS throughout </text:p>
        </text:list-item>
        <text:list-item>
          <text:p text:style-name="P14">These are known trade-offs made consciously for a research prototype, not oversights </text:p>
        </text:list-item>
      </text:list>
      <text:p text:style-name="P2"/>
      <text:p text:style-name="Text_20_body"><text:span text:style-name="Strong_20_Emphasis">[Limitations slide]</text:span></text:p>
      <text:list text:style-name="L7">
        <text:list-item>
          <text:p text:style-name="P15">Simulation vs real sensors — biggest limitation. The pipeline works but viability is demonstrated synthetically. Physical sensor integration is the key next step </text:p>
        </text:list-item>
        <text:list-item>
          <text:p text:style-name="P15">QuantumLeap REST API inconsistency — had to route historical queries directly to TimescaleDB. Pragmatic solution that works but introduces tighter coupling than ideal </text:p>
        </text:list-item>
        <text:list-item>
          <text:p text:style-name="P15">Weather/rainfall integration — Carlos suggested Open-Meteo rainfall data to contextualise readings. Valuable enhancement, not implemented within project timeline — this links directly to the time management issues I'll cover in part 2 </text:p>
        </text:list-item>
        <text:list-item>
          <text:p text:style-name="P16">No cloud deployment — local Docker Compose stack. Production would need AWS ECS or similar for high availability </text:p>
        </text:list-item>
      </text:list>
      <text:p text:style-name="P2"/>
      <text:p text:style-name="Text_20_body"><text:span text:style-name="Strong_20_Emphasis">[Tools &amp; Methods slide]</text:span></text:p>
      <text:list text:style-name="L8">
        <text:list-item>
          <text:p text:style-name="P17">FastAPI — async support proved genuinely valuable. Concurrent Orion-LD and TimescaleDB calls benefited from async handling. Flask would have required additional architectural effort to achieve the same multi-router structure — as justified in section 4.5 of the report </text:p>
        </text:list-item>
        <text:list-item>
          <text:p text:style-name="P17">QuantumLeap limitation — rather than working around at API layer, routed directly to TimescaleDB via asyncpg. Faster and more predictable. The trade-off is tighter coupling to the database schema — in a production system I'd either contribute a fix upstream to QuantumLeap or evaluate CrateDB more thoroughly despite its operational overhead </text:p>
        </text:list-item>
        <text:list-item>
          <text:p text:style-name="P17">Git — used throughout but no formal branching strategy. Commits functional but ad hoc. For a team project, Gitflow would be essential. This is a clear gap in professional practice </text:p>
        </text:list-item>
        <text:list-item>
          <text:p text:style-name="P18">Neovim + tmux — unconventional but effective for this stack. Single terminal environment with editor, Docker logs, and psql simultaneously reduced context switching </text:p>
        </text:list-item>
      </text:list>
      <text:p text:style-name="P2"/>
      <text:p text:style-name="Text_20_body"><text:span text:style-name="Strong_20_Emphasis">[Process &amp; Time Management slide]</text:span></text:p>
      <text:list text:style-name="L9">
        <text:list-item>
          <text:p text:style-name="P19"><text:soft-page-break/>Agile worked well — requirements evolved significantly, sprint structure absorbed this. Specific example: discovery mid-project that samplingPoint.notation could auto-route CSV ingestion eliminated the need for per-station upload UI, which was a significant scope change. Handled cleanly within a sprint </text:p>
        </text:list-item>
        <text:list-item>
          <text:p text:style-name="P19">Trello — honest reflection here. The board was created and categorised with labels but tasks were frequently tracked mentally rather than on the board. This meant I couldn't retrospectively assess velocity or identify blockers early. It was there but not consistently maintained. In future: every task on the board before starting it, no exceptions </text:p>
        </text:list-item>
        <text:list-item>
          <text:p text:style-name="P20">Competing priorities — job interviews including with major cloud providers took significant time in the final weeks, compressing report writing and testing into a shorter window than planned. This directly caused the rainfall integration feature to be deprioritised </text:p>
        </text:list-item>
      </text:list>
      <text:p text:style-name="P2"/>
      <text:p text:style-name="Text_20_body"><text:span text:style-name="Strong_20_Emphasis">[What I'd Do Differently slide]</text:span></text:p>
      <text:list text:style-name="L10">
        <text:list-item>
          <text:p text:style-name="P21">Start the report earlier — writing was largely left until development was complete. Writing sections concurrently with development would have been better and less stressful </text:p>
        </text:list-item>
        <text:list-item>
          <text:p text:style-name="P21">Structured testing from the start — testing happened in large batches. The iterative sprint approach didn't carry through to testing in practice. Continuous testing or even a basic regression suite would have caught issues earlier and given more confidence throughout </text:p>
        </text:list-item>
        <text:list-item>
          <text:p text:style-name="P22">Placement year context worth mentioning positively — prior exposure to SCADA systems and industrial monitoring directly informed decisions, particularly around real-time data value and infrastructure complexity in regulated environments. This shaped the problem framing from day one </text:p>
        </text:list-item>
      </text:list>
      <text:p text:style-name="P2"/>
      <text:p text:style-name="Text_20_body"><text:span text:style-name="Strong_20_Emphasis">[PDP slide]</text:span></text:p>
      <text:list text:style-name="L11">
        <text:list-item>
          <text:p text:style-name="P23">Working with Docker and containerised infrastructure throughout this project has directly strengthened my understanding of cloud deployment architectures — relevant to roles I'm currently pursuing </text:p>
        </text:list-item>
      </text:list>
      <text:p text:style-name="Text_20_body">Four SMART goals:</text:p>
      <text:list text:style-name="L12">
        <text:list-item>
          <text:p text:style-name="P24"><text:span text:style-name="Strong_20_Emphasis">AWS Solutions Architect Associate</text:span> — complete AWS training, sit the exam by October 2026 </text:p>
        </text:list-item>
        <text:list-item>
          <text:p text:style-name="P24"><text:span text:style-name="Strong_20_Emphasis">Automated integration testing</text:span> — implement pytest and CI/CD pipeline on a personal project by July 2026 </text:p>
        </text:list-item>
        <text:list-item>
          <text:p text:style-name="P24"><text:span text:style-name="Strong_20_Emphasis">NGSI-LD contribution</text:span> — follow AD4GD and WATERVERSE open repos, make at least one contribution by October 2026 </text:p>
        </text:list-item>
        <text:list-item>
          <text:p text:style-name="P25"><text:span text:style-name="Strong_20_Emphasis">Production cloud deployment</text:span> — deploy a containerised system to AWS ECS/EKS by March 2027 </text:p>
        </text:list-item>
      </text:list>
      <text:p text:style-name="Text_20_body"><text:span text:style-name="Emphasis">Footnote on AD4GD and WATERVERSE: Crettaz &amp; Brékine (2024); WATERVERSE (n.d.)</text:span></text:p>
      <text:p text:style-name="P2"/>
      <text:p text:style-name="Text_20_body"><text:span text:style-name="Strong_20_Emphasis">[Summary slide]</text:span></text:p>
      <text:list text:style-name="L13">
        <text:list-item>
          <text:p text:style-name="P26">All 7 specs met, pipeline verified end to end, accessibility 90+ across all pages </text:p>
        </text:list-item>
        <text:list-item>
          <text:p text:style-name="P26">Key limitations acknowledged — simulation not live sensors, QuantumLeap workaround, no cloud deployment, no API authentication </text:p>
        </text:list-item>
        <text:list-item>
          <text:p text:style-name="P26"><text:soft-page-break/>These limitations directly inform the PDP priorities </text:p>
        </text:list-item>
        <text:list-item>
          <text:p text:style-name="P27">The system demonstrates FIWARE and NGSI-LD as a viable foundation for semantic interoperability in environmental monitoring — consistent with AD4GD and WATERVERSE approaches reviewed in the report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04:56:48.172047923</meta:creation-date>
    <dc:date>2026-04-27T15:55:57.046103264</dc:date>
    <meta:editing-duration>PT1M56S</meta:editing-duration>
    <meta:editing-cycles>3</meta:editing-cycles>
    <meta:generator>LibreOffice/25.8.6.2$Linux_X86_64 LibreOffice_project/580$Build-2</meta:generator>
    <meta:document-statistic meta:table-count="0" meta:image-count="0" meta:object-count="0" meta:page-count="4" meta:paragraph-count="65" meta:word-count="1078" meta:character-count="7357" meta:non-whitespace-character-count="6303"/>
  </office:meta>
</office:document-meta>
</file>